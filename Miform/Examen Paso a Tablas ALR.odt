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964" officeooo:paragraph-rsid="00113964"/>
    </style:style>
    <style:style style:name="P2" style:family="paragraph" style:parent-style-name="Standard">
      <style:text-properties style:text-underline-style="none" officeooo:rsid="00113964" officeooo:paragraph-rsid="00113964"/>
    </style:style>
    <style:style style:name="P3" style:family="paragraph" style:parent-style-name="Standard">
      <style:text-properties style:text-underline-style="solid" style:text-underline-width="auto" style:text-underline-color="font-color" officeooo:rsid="00113964" officeooo:paragraph-rsid="00113964"/>
    </style:style>
    <style:style style:name="P4" style:family="paragraph" style:parent-style-name="Standard">
      <style:text-properties style:text-underline-style="none" officeooo:rsid="00113964" officeooo:paragraph-rsid="00118428"/>
    </style:style>
    <style:style style:name="P5" style:family="paragraph" style:parent-style-name="Standard">
      <style:text-properties style:text-underline-style="none" officeooo:rsid="0011ba0e" officeooo:paragraph-rsid="0011ba0e"/>
    </style:style>
    <style:style style:name="P6" style:family="paragraph" style:parent-style-name="Standard">
      <style:text-properties style:text-underline-style="none" officeooo:rsid="00113964" officeooo:paragraph-rsid="0011ba0e"/>
    </style:style>
    <style:style style:name="P7" style:family="paragraph" style:parent-style-name="Standard">
      <style:paragraph-properties fo:break-before="page"/>
      <style:text-properties style:text-underline-style="none" officeooo:rsid="0011ba0e" officeooo:paragraph-rsid="0011ba0e"/>
    </style:style>
    <style:style style:name="P8" style:family="paragraph" style:parent-style-name="Standard">
      <style:text-properties style:text-underline-style="none" officeooo:rsid="0012889a" officeooo:paragraph-rsid="0012889a"/>
    </style:style>
    <style:style style:name="P9" style:family="paragraph" style:parent-style-name="Standard">
      <style:text-properties style:text-underline-style="none" officeooo:rsid="0012889a" officeooo:paragraph-rsid="0012dd8d"/>
    </style:style>
    <style:style style:name="P10" style:family="paragraph" style:parent-style-name="Standard">
      <style:text-properties style:text-underline-style="none" officeooo:rsid="0012dd8d" officeooo:paragraph-rsid="0012dd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 officeooo:rsid="00118428"/>
    </style:style>
    <style:style style:name="T4" style:family="text">
      <style:text-properties officeooo:rsid="00118428"/>
    </style:style>
    <style:style style:name="T5" style:family="text">
      <style:text-properties style:text-underline-style="solid" style:text-underline-width="auto" style:text-underline-color="font-color" officeooo:rsid="00113964"/>
    </style:style>
    <style:style style:name="T6" style:family="text">
      <style:text-properties officeooo:rsid="00113964"/>
    </style:style>
    <style:style style:name="T7" style:family="text">
      <style:text-properties officeooo:rsid="0011ba0e"/>
    </style:style>
    <style:style style:name="T8" style:family="text">
      <style:text-properties style:text-underline-style="solid" style:text-underline-width="auto" style:text-underline-color="font-color" officeooo:rsid="0011ba0e"/>
    </style:style>
    <style:style style:name="T9" style:family="text">
      <style:text-properties officeooo:rsid="0012dd8d"/>
    </style:style>
    <style:style style:name="T10" style:family="text">
      <style:text-properties style:text-underline-style="solid" style:text-underline-width="auto" style:text-underline-color="font-color" officeooo:rsid="00128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eado(<text:span text:style-name="T1">CodEmp</text:span><text:span text:style-name="T2">, Cuenta, NIF, Nombre, NumHijos, Retención)</text:span></text:p>
      <text:p text:style-name="P2"/>
      <text:p text:style-name="P3"><text:span text:style-name="T2">Sede(</text:span>CodSede<text:span text:style-name="T2">, Nombre)</text:span></text:p>
      <text:p text:style-name="P2"/>
      <text:p text:style-name="P2">Departamento(<text:span text:style-name="T1">CodDpto, CodSede</text:span>, Nombre)</text:p>
      <text:p text:style-name="P2"><text:tab/>CodSede is fk Sede(<text:span text:style-name="T1">CodSede</text:span>)</text:p>
      <text:p text:style-name="P2"/>
      <text:p text:style-name="P2">Trabaja(<text:span text:style-name="T1">CodDpto, CodEmp</text:span>, Funcion)</text:p>
      <text:p text:style-name="P2"><text:tab/>CodDpto is fk Departamento(<text:span text:style-name="T1">CodDpto</text:span>)</text:p>
      <text:p text:style-name="P2"><text:tab/>CodEmp is fk Empleado(<text:span text:style-name="T1">CodEmp</text:span>)</text:p>
      <text:p text:style-name="P2"/>
      <text:p text:style-name="P2">Nomina(<text:span text:style-name="T1">NumOrden, CodEmp</text:span>, EjercicioFiscal, Mes, TotalIngreso, TotalDescuento)</text:p>
      <text:p text:style-name="P2"><text:tab/>CodEmp is fk Empleado(<text:span text:style-name="T1">CodEmp</text:span>)</text:p>
      <text:p text:style-name="P2"/>
      <text:p text:style-name="P2">Linea(<text:span text:style-name="T1">L</text:span><text:span text:style-name="T3">í</text:span><text:span text:style-name="T1">neaNum, NumOrden, CodEmp</text:span>, <text:span text:style-name="T4">Cantidad)</text:span></text:p>
      <text:p text:style-name="P4"><text:tab/><text:span text:style-name="T4">NumOrden is fk </text:span>Nomina(<text:span text:style-name="T1">NumOrden</text:span><text:span text:style-name="T4">)</text:span></text:p>
      <text:p text:style-name="P4"><text:tab/>CodEmp is fk <text:span text:style-name="T4">Nomina</text:span>(<text:span text:style-name="T1">CodEmp</text:span>)</text:p>
      <text:p text:style-name="P5"/>
      <text:p text:style-name="P5">Descuento(<text:span text:style-name="T5">L</text:span><text:span text:style-name="T3">í</text:span><text:span text:style-name="T5">neaNum, NumOrden, CodEmp</text:span><text:span text:style-name="T6">, </text:span>Base, Porcentaje)</text:p>
      <text:p text:style-name="P5"><text:tab/>LíneaNum is FK <text:span text:style-name="T6">Linea(</text:span><text:span text:style-name="T5">L</text:span><text:span text:style-name="T3">í</text:span><text:span text:style-name="T5">neaNum</text:span>)</text:p>
      <text:p text:style-name="P5"><text:tab/><text:span text:style-name="T4">NumOrden is fk </text:span><text:span text:style-name="T6">Linea(</text:span><text:span text:style-name="T5">NumOrden</text:span><text:span text:style-name="T4">)</text:span></text:p>
      <text:p text:style-name="P6"><text:tab/>CodEmp is fk Linea(<text:span text:style-name="T1">CodEmp</text:span>)</text:p>
      <text:p text:style-name="P5"/>
      <text:p text:style-name="P5">ConceptoRetribuivo(<text:span text:style-name="T1">Cod</text:span>, Descripción)</text:p>
      <text:p text:style-name="P5"/>
      <text:p text:style-name="P5">Ingreso(<text:span text:style-name="T5">L</text:span><text:span text:style-name="T3">í</text:span><text:span text:style-name="T5">neaNum, NumOrden, CodEmp, </text:span><text:span text:style-name="T1">Cod</text:span>)</text:p>
      <text:p text:style-name="P5"><text:tab/>LíneaNum is FK <text:span text:style-name="T6">Linea(</text:span><text:span text:style-name="T5">L</text:span><text:span text:style-name="T3">í</text:span><text:span text:style-name="T5">neaNum</text:span>)</text:p>
      <text:p text:style-name="P5"><text:tab/><text:span text:style-name="T4">NumOrden is fk </text:span><text:span text:style-name="T6">Linea(</text:span><text:span text:style-name="T5">NumOrden</text:span><text:span text:style-name="T4">)</text:span></text:p>
      <text:p text:style-name="P6"><text:tab/>CodEmp is fk Linea(<text:span text:style-name="T1">CodEmp</text:span>)</text:p>
      <text:p text:style-name="P6"><text:tab/><text:span text:style-name="T7">Cod is fk ConceptoRetribuivo(</text:span><text:span text:style-name="T8">Cod</text:span><text:span text:style-name="T7">)</text:span></text:p>
      <text:p text:style-name="P7">Elemento(<text:span text:style-name="T1">Código</text:span>, Descripción, Saldo)</text:p>
      <text:p text:style-name="P5"/>
      <text:p text:style-name="P5">Imputa(<text:span text:style-name="T5">L</text:span><text:span text:style-name="T3">í</text:span><text:span text:style-name="T5">neaNum, NumOrden, CodEmp, </text:span><text:span text:style-name="T1">CodElemento</text:span>)</text:p>
      <text:p text:style-name="P5"><text:tab/>LíneaNum is FK <text:span text:style-name="T6">Linea(</text:span><text:span text:style-name="T5">L</text:span><text:span text:style-name="T3">í</text:span><text:span text:style-name="T5">neaNum</text:span>)</text:p>
      <text:p text:style-name="P5"><text:tab/><text:span text:style-name="T4">NumOrden is fk </text:span><text:span text:style-name="T6">Linea(</text:span><text:span text:style-name="T5">NumOrden</text:span><text:span text:style-name="T4">)</text:span></text:p>
      <text:p text:style-name="P6"><text:tab/>CodEmp is fk Linea(<text:span text:style-name="T1">CodEmp</text:span>)</text:p>
      <text:p text:style-name="P6"><text:tab/><text:span text:style-name="T7">CodElemento is fk Elemento(</text:span><text:span text:style-name="T8">Código</text:span><text:span text:style-name="T7">)</text:span></text:p>
      <text:p text:style-name="P5"/>
      <text:p text:style-name="P5">Contiene(<text:span text:style-name="T1">CodElemento1, CodElemento2</text:span>)</text:p>
      <text:p text:style-name="P5"><text:tab/> CodElemento1 is fk Elemento(<text:span text:style-name="T1">Código</text:span>)</text:p>
      <text:p text:style-name="P5"><text:tab/>CodElemento2 is fk Elemento(<text:span text:style-name="T1">Código</text:span>)</text:p>
      <text:p text:style-name="P5"/>
      <text:p text:style-name="P5">Transferencia(<text:span text:style-name="T1">Codigo</text:span>, Cantidad, Cuenta)</text:p>
      <text:p text:style-name="P8"/>
      <text:p text:style-name="P8">ET(<text:span text:style-name="T1">CodElemento, CodTransferencia</text:span>, Fecha)</text:p>
      <text:p text:style-name="P9"><text:tab/><text:span text:style-name="T9">CodElemento is fk </text:span><text:span text:style-name="T7">Elemento(</text:span><text:span text:style-name="T8">Código</text:span><text:span text:style-name="T9">)</text:span></text:p>
      <text:p text:style-name="P9"><text:tab/><text:span text:style-name="T9">CodTransferencia is fk </text:span><text:span text:style-name="T7">Transferencia(</text:span><text:span text:style-name="T8">Codigo</text:span><text:span text:style-name="T9">)</text:span></text:p>
      <text:p text:style-name="P10"/>
      <text:p text:style-name="P10">Referencia(<text:span text:style-name="T10">CodTransferencia</text:span><text:span text:style-name="T1">1, </text:span><text:span text:style-name="T10">CodTransferencia</text:span><text:span text:style-name="T1">2</text:span>)</text:p>
      <text:p text:style-name="P10"><text:tab/>CodTransferencia1 is fk <text:span text:style-name="T7">Transferencia(</text:span><text:span text:style-name="T8">Codigo</text:span>)</text:p>
      <text:p text:style-name="P10"><text:tab/>CodTransferencia2 is fk <text:span text:style-name="T7">Transferencia(</text:span><text:span text:style-name="T8">Codig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08:56:18.494968400</meta:creation-date>
    <dc:date>2026-05-28T09:34:36.859036900</dc:date>
    <meta:editing-duration>PT11M2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8" meta:word-count="144" meta:character-count="1411" meta:non-whitespace-character-count="1281"/>
  </office:meta>
</office:document-meta>
</file>